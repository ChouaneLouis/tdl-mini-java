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9075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96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3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12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Mouad Akli (voir groupe 9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 office:value-type="string" calcext:value-type="string">
            <text:p>/</text:p>
          </table:table-cell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12-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08:11:39.717009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2:34:20.064204630</meta:creation-date>
    <dc:date>2026-05-07T09:30:57.801681956</dc:date>
    <meta:editing-duration>PT4H26M46S</meta:editing-duration>
    <meta:editing-cycles>16</meta:editing-cycles>
    <meta:generator>LibreOffice/24.2.7.2$Linux_X86_64 LibreOffice_project/420$Build-2</meta:generator>
    <meta:document-statistic meta:table-count="16" meta:cell-count="270" meta:object-count="0"/>
  </office:meta>
</office:document-meta>
</file>